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<text:line-break/>:root{--bg:#111;--panel:#1a1a1a;--accent:#f4d35e;color:#eee}<text:line-break/>body{margin:0;font-family:system-ui,Segoe UI,Helvetica,Arial;background:linear-gradient(180deg,#000,#111);color:var(--accent);display:flex;align-items:center;justify-content:center;height:100vh}<text:line-break/>main{width:720px;background:var(--panel);padding:20px;border-radius:8px;box-shadow:0 8px 30px rgba(0,0,0,.7)}<text:line-break/>h1{margin:0 0 12px;font-size:20px;color:var(--accent)}<text:line-break/>#output{height:320px;overflow:auto;background:#0d0d0d;padding:12px;border-radius:6px;color:#ddd;font-family:monospace}<text:line-break/>#cmd{width:calc(100% - 60px);padding:8px;border-radius:6px;border:1px solid #333;background:#0b0b0b;color:#fff}<text:line-break/>#send{width:44px;margin-left:6px;padding:8px;border-radius:6px;background:var(--accent);border:none;color:#000;font-weight:bold}<text:line-break/>#status{margin-top:10px;color:#cfc; font-size:13px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20T16:10:30.412740575</dc:date>
    <meta:editing-duration>PT2M15S</meta:editing-duration>
    <meta:editing-cycles>1</meta:editing-cycles>
    <meta:document-statistic meta:table-count="0" meta:image-count="0" meta:object-count="0" meta:page-count="1" meta:paragraph-count="1" meta:word-count="27" meta:character-count="836" meta:non-whitespace-character-count="817"/>
    <meta:generator>LibreOffice/24.2.7.2$Linux_X86_64 LibreOffice_project/420$Build-2</meta:generator>
  </office:meta>
</office:document-meta>
</file>